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3.277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0.416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4.939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4.556cm"/>
    </style:style>
    <style:style style:name="co17" style:family="table-column">
      <style:table-column-properties fo:break-before="auto" style:column-width="5.075cm"/>
    </style:style>
    <style:style style:name="co18" style:family="table-column">
      <style:table-column-properties fo:break-before="auto" style:column-width="4.53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358cm"/>
    </style:style>
    <style:style style:name="co21" style:family="table-column">
      <style:table-column-properties fo:break-before="auto" style:column-width="4.503cm"/>
    </style:style>
    <style:style style:name="co22" style:family="table-column">
      <style:table-column-properties fo:break-before="auto" style:column-width="3.93cm"/>
    </style:style>
    <style:style style:name="co23" style:family="table-column">
      <style:table-column-properties fo:break-before="auto" style:column-width="5.02cm"/>
    </style:style>
    <style:style style:name="co24" style:family="table-column">
      <style:table-column-properties fo:break-before="auto" style:column-width="4.47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FileName/RunID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True Nega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FP: Explicit in Axiom</text:p>
          </table:table-cell>
          <table:table-cell office:value-type="string" calcext:value-type="string">
            <text:p>FP: Explicit in NL</text:p>
          </table:table-cell>
          <table:table-cell office:value-type="string" calcext:value-type="string">
            <text:p>FP: Perfect Mat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N: More Info in Axiom</text:p>
          </table:table-cell>
          <table:table-cell office:value-type="string" calcext:value-type="string">
            <text:p>FN:More Info in NL</text:p>
          </table:table-cell>
          <table:table-cell office:value-type="string" calcext:value-type="string">
            <text:p>FN:No Contradictions</text:p>
          </table:table-cell>
          <table:table-cell office:value-type="string" calcext:value-type="string">
            <text:p>FN:Contradiction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% of Explicit in Axiom Wrong</text:p>
          </table:table-cell>
          <table:table-cell office:value-type="string" calcext:value-type="string">
            <text:p>% of Explicit in NL Wrong</text:p>
          </table:table-cell>
          <table:table-cell office:value-type="string" calcext:value-type="string">
            <text:p>% Of Perfect Match Wro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% of More in Axiom Wrong</text:p>
          </table:table-cell>
          <table:table-cell office:value-type="string" calcext:value-type="string">
            <text:p>% of More in NL Wrong</text:p>
          </table:table-cell>
          <table:table-cell office:value-type="string" calcext:value-type="string">
            <text:p>% of No Contradictions Wrong</text:p>
          </table:table-cell>
          <table:table-cell office:value-type="string" calcext:value-type="string">
            <text:p>% of Contradictions Wro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% of Errors Ex in Ax</text:p>
          </table:table-cell>
          <table:table-cell office:value-type="string" calcext:value-type="string">
            <text:p>% of Errors Ex in NL</text:p>
          </table:table-cell>
          <table:table-cell office:value-type="string" calcext:value-type="string">
            <text:p>% of Errors Perfect</text:p>
          </table:table-cell>
          <table:table-cell office:value-type="string" calcext:value-type="string">
            <text:p>% of Errors More in Axiom</text:p>
          </table:table-cell>
          <table:table-cell office:value-type="string" calcext:value-type="string">
            <text:p>% of Errors More in NL</text:p>
          </table:table-cell>
          <table:table-cell office:value-type="string" calcext:value-type="string">
            <text:p>% of Errors No Contradictions</text:p>
          </table:table-cell>
          <table:table-cell office:value-type="string" calcext:value-type="string">
            <text:p>% of Errors Contradictions</text:p>
          </table:table-cell>
        </table:table-row>
        <table:table-row table:style-name="ro1">
          <table:table-cell office:value-type="string" calcext:value-type="string">
            <text:p>basic: 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B2]+[.C2])/SUM([.B2:.E2])" office:value-type="float" office:value="0.533333333333333" calcext:value-type="float">
            <text:p>0.533333333333333</text:p>
          </table:table-cell>
          <table:table-cell table:formula="of:=([.B2]*[.C2]-[.D2]*[.E2])/SQRT(([.B2]+[.D2])*([.B2]+[.E2])*([.C2]+[.D2])*([.C2]+[.E2])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95652173913044" calcext:value-type="float">
            <text:p>0.695652173913044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B3]+[.C3])/SUM([.B3:.E3])" office:value-type="float" office:value="0.533333333333333" calcext:value-type="float">
            <text:p>0.533333333333333</text:p>
          </table:table-cell>
          <table:table-cell table:formula="of:=([.B3]*[.C3]-[.D3]*[.E3])/SQRT(([.B3]+[.D3])*([.B3]+[.E3])*([.C3]+[.D3])*([.C3]+[.E3])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95652173913044" calcext:value-type="float">
            <text:p>0.695652173913044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B4]+[.C4])/SUM([.B4:.E4])" office:value-type="float" office:value="0.533333333333333" calcext:value-type="float">
            <text:p>0.533333333333333</text:p>
          </table:table-cell>
          <table:table-cell table:formula="of:=([.B4]*[.C4]-[.D4]*[.E4])/SQRT(([.B4]+[.D4])*([.B4]+[.E4])*([.C4]+[.D4])*([.C4]+[.E4])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95652173913044" calcext:value-type="float">
            <text:p>0.695652173913044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4</text:p>
          </table:table-cell>
          <table:table-cell office:value-type="float" office:value="24" calcext:value-type="float">
            <text:p>2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0" calcext:value-type="float">
            <text:p>0</text:p>
          </table:table-cell>
          <table:table-cell table:formula="of:=([.B5]+[.C5])/SUM([.B5:.E5])" office:value-type="float" office:value="0.540740740740741" calcext:value-type="float">
            <text:p>0.540740740740741</text:p>
          </table:table-cell>
          <table:table-cell table:formula="of:=([.B5]*[.C5]-[.D5]*[.E5])/SQRT(([.B5]+[.D5])*([.B5]+[.E5])*([.C5]+[.D5])*([.C5]+[.E5]))" office:value-type="float" office:value="0.092351419307922" calcext:value-type="float">
            <text:p>0.092351419307922</text:p>
          </table:table-cell>
          <table:table-cell office:value-type="float" office:value="9" calcext:value-type="float">
            <text:p>9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37373737373737" calcext:value-type="float">
            <text:p>0.537373737373737</text:p>
          </table:table-cell>
          <table:table-cell office:value-type="float" office:value="1" calcext:value-type="float">
            <text:p>1</text:p>
          </table:table-cell>
          <table:table-cell office:value-type="float" office:value="0.699062233589088" calcext:value-type="float">
            <text:p>0.699062233589088</text:p>
          </table:table-cell>
          <table:table-cell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3.5714285714286" calcext:value-type="float">
            <text:p>43.5714285714286</text:p>
          </table:table-cell>
          <table:table-cell office:value-type="float" office:value="17.6984126984127" calcext:value-type="float">
            <text:p>17.6984126984127</text:p>
          </table:table-cell>
          <table:table-cell office:value-type="float" office:value="38.7301587301587" calcext:value-type="float">
            <text:p>38.7301587301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5</text:p>
          </table:table-cell>
          <table:table-cell office:value-type="float" office:value="23.6666666666667" calcext:value-type="float">
            <text:p>23.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0.333333333333333" calcext:value-type="float">
            <text:p>0.333333333333333</text:p>
          </table:table-cell>
          <table:table-cell table:formula="of:=([.B6]+[.C6])/SUM([.B6:.E6])" office:value-type="float" office:value="0.555555555555556" calcext:value-type="float">
            <text:p>0.555555555555556</text:p>
          </table:table-cell>
          <table:table-cell table:formula="of:=([.B6]*[.C6]-[.D6]*[.E6])/SQRT(([.B6]+[.D6])*([.B6]+[.E6])*([.C6]+[.D6])*([.C6]+[.E6]))" office:value-type="float" office:value="0.13103560459024" calcext:value-type="float">
            <text:p>0.131035604590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461592670895" calcext:value-type="float">
            <text:p>0.5461592670895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702955809189347" calcext:value-type="float">
            <text:p>0.702955809189347</text:p>
          </table:table-cell>
          <table:table-cell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5.8333333333333" calcext:value-type="float">
            <text:p>95.8333333333333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5.0751879699248" calcext:value-type="float">
            <text:p>45.0751879699248</text:p>
          </table:table-cell>
          <table:table-cell office:value-type="float" office:value="15.0250626566416" calcext:value-type="float">
            <text:p>15.0250626566416</text:p>
          </table:table-cell>
          <table:table-cell office:value-type="float" office:value="38.312447786132" calcext:value-type="float">
            <text:p>38.312447786132</text:p>
          </table:table-cell>
          <table:table-cell office:value-type="float" office:value="0" calcext:value-type="float">
            <text:p>0</text:p>
          </table:table-cell>
          <table:table-cell office:value-type="float" office:value="1.58730158730159" calcext:value-type="float">
            <text:p>1.5873015873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B7]+[.C7])/SUM([.B7:.E7])" office:value-type="float" office:value="0.577777777777778" calcext:value-type="float">
            <text:p>0.577777777777778</text:p>
          </table:table-cell>
          <table:table-cell table:formula="of:=([.B7]*[.C7]-[.D7]*[.E7])/SQRT(([.B7]+[.D7])*([.B7]+[.E7])*([.C7]+[.D7])*([.C7]+[.E7]))" office:value-type="float" office:value="0.230556167081694" calcext:value-type="float">
            <text:p>0.230556167081694</text:p>
          </table:table-cell>
          <table:table-cell office:value-type="float" office:value="8.66666666666667" calcext:value-type="float">
            <text:p>8.66666666666667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58340883922279" calcext:value-type="float">
            <text:p>0.558340883922279</text:p>
          </table:table-cell>
          <table:table-cell office:value-type="float" office:value="1" calcext:value-type="float">
            <text:p>1</text:p>
          </table:table-cell>
          <table:table-cell office:value-type="float" office:value="0.716524330220555" calcext:value-type="float">
            <text:p>0.716524330220555</text:p>
          </table:table-cell>
          <table:table-cell office:value-type="string" calcext:value-type="string">
            <text:p><text:s/>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5.6042884990253" calcext:value-type="float">
            <text:p>45.6042884990253</text:p>
          </table:table-cell>
          <table:table-cell office:value-type="float" office:value="17.5730994152047" calcext:value-type="float">
            <text:p>17.5730994152047</text:p>
          </table:table-cell>
          <table:table-cell office:value-type="float" office:value="36.82261208577" calcext:value-type="float">
            <text:p>36.822612085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B8]+[.C8])/SUM([.B8:.E8])" office:value-type="float" office:value="0.577777777777778" calcext:value-type="float">
            <text:p>0.577777777777778</text:p>
          </table:table-cell>
          <table:table-cell table:formula="of:=([.B8]*[.C8]-[.D8]*[.E8])/SQRT(([.B8]+[.D8])*([.B8]+[.E8])*([.C8]+[.D8])*([.C8]+[.E8]))" office:value-type="float" office:value="0.230556167081694" calcext:value-type="float">
            <text:p>0.230556167081694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58758314855876" calcext:value-type="float">
            <text:p>0.558758314855876</text:p>
          </table:table-cell>
          <table:table-cell office:value-type="float" office:value="1" calcext:value-type="float">
            <text:p>1</text:p>
          </table:table-cell>
          <table:table-cell office:value-type="float" office:value="0.716742081447964" calcext:value-type="float">
            <text:p>0.716742081447964</text:p>
          </table:table-cell>
          <table:table-cell office:value-type="string" calcext:value-type="string">
            <text:p><text:s/>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91.6666666666667" calcext:value-type="float">
            <text:p>91.6666666666667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4.0196078431373" calcext:value-type="float">
            <text:p>44.0196078431373</text:p>
          </table:table-cell>
          <table:table-cell office:value-type="float" office:value="17.5490196078431" calcext:value-type="float">
            <text:p>17.5490196078431</text:p>
          </table:table-cell>
          <table:table-cell office:value-type="float" office:value="38.4313725490196" calcext:value-type="float">
            <text:p>38.4313725490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B9]+[.C9])/SUM([.B9:.E9])" office:value-type="float" office:value="0.577777777777778" calcext:value-type="float">
            <text:p>0.577777777777778</text:p>
          </table:table-cell>
          <table:table-cell table:formula="of:=([.B9]*[.C9]-[.D9]*[.E9])/SQRT(([.B9]+[.D9])*([.B9]+[.E9])*([.C9]+[.D9])*([.C9]+[.E9]))" office:value-type="float" office:value="0.230556167081694" calcext:value-type="float">
            <text:p>0.230556167081694</text:p>
          </table:table-cell>
          <table:table-cell office:value-type="float" office:value="9" calcext:value-type="float">
            <text:p>9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58340883922279" calcext:value-type="float">
            <text:p>0.558340883922279</text:p>
          </table:table-cell>
          <table:table-cell office:value-type="float" office:value="1" calcext:value-type="float">
            <text:p>1</text:p>
          </table:table-cell>
          <table:table-cell office:value-type="float" office:value="0.716524330220555" calcext:value-type="float">
            <text:p>0.716524330220555</text:p>
          </table:table-cell>
          <table:table-cell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79.1666666666667" calcext:value-type="float">
            <text:p>79.1666666666667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7.4561403508772" calcext:value-type="float">
            <text:p>47.4561403508772</text:p>
          </table:table-cell>
          <table:table-cell office:value-type="float" office:value="19.2397660818714" calcext:value-type="float">
            <text:p>19.2397660818714</text:p>
          </table:table-cell>
          <table:table-cell office:value-type="float" office:value="33.3040935672515" calcext:value-type="float">
            <text:p>33.30409356725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4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666666666666667" calcext:value-type="float">
            <text:p>0.666666666666667</text:p>
          </table:table-cell>
          <table:table-cell table:formula="of:=([.B10]+[.C10])/SUM([.B10:.E10])" office:value-type="float" office:value="0.585185185185185" calcext:value-type="float">
            <text:p>0.585185185185185</text:p>
          </table:table-cell>
          <table:table-cell table:formula="of:=([.B10]*[.C10]-[.D10]*[.E10])/SQRT(([.B10]+[.D10])*([.B10]+[.E10])*([.C10]+[.D10])*([.C10]+[.E10]))" office:value-type="float" office:value="0.20985861140914" calcext:value-type="float">
            <text:p>0.20985861140914</text:p>
          </table:table-cell>
          <table:table-cell office:value-type="float" office:value="9" calcext:value-type="float">
            <text:p>9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<text:s/>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64653503677894" calcext:value-type="float">
            <text:p>0.564653503677894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714374514374514" calcext:value-type="float">
            <text:p>0.714374514374514</text:p>
          </table:table-cell>
          <table:table-cell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70.8333333333333" calcext:value-type="float">
            <text:p>70.8333333333333</text:p>
          </table:table-cell>
          <table:table-cell office:value-type="string" calcext:value-type="string">
            <text:p><text:s/></text:p>
          </table:table-cell>
          <table:table-cell office:value-type="float" office:value="13.3333333333333" calcext:value-type="float">
            <text:p>13.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8.4365325077399" calcext:value-type="float">
            <text:p>48.4365325077399</text:p>
          </table:table-cell>
          <table:table-cell office:value-type="float" office:value="18.1062951496388" calcext:value-type="float">
            <text:p>18.1062951496388</text:p>
          </table:table-cell>
          <table:table-cell office:value-type="float" office:value="30.0361197110423" calcext:value-type="float">
            <text:p>30.0361197110423</text:p>
          </table:table-cell>
          <table:table-cell office:value-type="float" office:value="3.42105263157895" calcext:value-type="float">
            <text:p>3.42105263157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6</text:p>
          </table:table-cell>
          <table:table-cell office:value-type="float" office:value="23" calcext:value-type="float">
            <text:p>2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1" calcext:value-type="float">
            <text:p>1</text:p>
          </table:table-cell>
          <table:table-cell table:formula="of:=([.B11]+[.C11])/SUM([.B11:.E11])" office:value-type="float" office:value="0.592592592592593" calcext:value-type="float">
            <text:p>0.592592592592593</text:p>
          </table:table-cell>
          <table:table-cell table:formula="of:=([.B11]*[.C11]-[.D11]*[.E11])/SQRT(([.B11]+[.D11])*([.B11]+[.E11])*([.C11]+[.D11])*([.C11]+[.E11]))" office:value-type="float" office:value="0.217532467532468" calcext:value-type="float">
            <text:p>0.2175324675324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<text:s/>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70325203252033" calcext:value-type="float">
            <text:p>0.57032520325203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715064102564103" calcext:value-type="float">
            <text:p>0.715064102564103</text:p>
          </table:table-cell>
          <table:table-cell office:value-type="string" calcext:value-type="string">
            <text:p><text:s/>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75" calcext:value-type="float">
            <text:p>75</text:p>
          </table:table-cell>
          <table:table-cell office:value-type="float" office:value="79.1666666666667" calcext:value-type="float">
            <text:p>79.1666666666667</text:p>
          </table:table-cell>
          <table:table-cell office:value-type="string" calcext:value-type="string">
            <text:p><text:s/>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5.55555555555556" calcext:value-type="float">
            <text:p>5.5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3.6647173489279" calcext:value-type="float">
            <text:p>43.6647173489279</text:p>
          </table:table-cell>
          <table:table-cell office:value-type="float" office:value="16.374269005848" calcext:value-type="float">
            <text:p>16.374269005848</text:p>
          </table:table-cell>
          <table:table-cell office:value-type="float" office:value="34.5029239766082" calcext:value-type="float">
            <text:p>34.5029239766082</text:p>
          </table:table-cell>
          <table:table-cell office:value-type="float" office:value="3.60623781676413" calcext:value-type="float">
            <text:p>3.60623781676413</text:p>
          </table:table-cell>
          <table:table-cell office:value-type="float" office:value="1.85185185185185" calcext:value-type="float">
            <text:p>1.85185185185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7</text:p>
          </table:table-cell>
          <table:table-cell office:value-type="float" office:value="23" calcext:value-type="float">
            <text:p>2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1" calcext:value-type="float">
            <text:p>1</text:p>
          </table:table-cell>
          <table:table-cell table:formula="of:=([.B12]+[.C12])/SUM([.B12:.E12])" office:value-type="float" office:value="0.592592592592593" calcext:value-type="float">
            <text:p>0.592592592592593</text:p>
          </table:table-cell>
          <table:table-cell table:formula="of:=([.B12]*[.C12]-[.D12]*[.E12])/SQRT(([.B12]+[.D12])*([.B12]+[.E12])*([.C12]+[.D12])*([.C12]+[.E12]))" office:value-type="float" office:value="0.217532467532468" calcext:value-type="float">
            <text:p>0.217532467532468</text:p>
          </table:table-cell>
          <table:table-cell office:value-type="float" office:value="9" calcext:value-type="float">
            <text:p>9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70450516535241" calcext:value-type="float">
            <text:p>0.57045051653524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714880818106625" calcext:value-type="float">
            <text:p>0.714880818106625</text:p>
          </table:table-cell>
          <table:table-cell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19.9805068226121" calcext:value-type="float">
            <text:p>19.9805068226121</text:p>
          </table:table-cell>
          <table:table-cell office:value-type="float" office:value="25.4385964912281" calcext:value-type="float">
            <text:p>25.4385964912281</text:p>
          </table:table-cell>
          <table:table-cell office:value-type="float" office:value="0" calcext:value-type="float">
            <text:p>0</text:p>
          </table:table-cell>
          <table:table-cell office:value-type="float" office:value="5.45808966861598" calcext:value-type="float">
            <text:p>5.45808966861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4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33333333333333" calcext:value-type="float">
            <text:p>1.33333333333333</text:p>
          </table:table-cell>
          <table:table-cell table:formula="of:=([.B13]+[.C13])/SUM([.B13:.E13])" office:value-type="float" office:value="0.592592592592593" calcext:value-type="float">
            <text:p>0.592592592592593</text:p>
          </table:table-cell>
          <table:table-cell table:formula="of:=([.B13]*[.C13]-[.D13]*[.E13])/SQRT(([.B13]+[.D13])*([.B13]+[.E13])*([.C13]+[.D13])*([.C13]+[.E13]))" office:value-type="float" office:value="0.208248281958761" calcext:value-type="float">
            <text:p>0.2082482819587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71367521367521" calcext:value-type="float">
            <text:p>0.57136752136752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11970899470899" calcext:value-type="float">
            <text:p>0.711970899470899</text:p>
          </table:table-cell>
          <table:table-cell office:value-type="string" calcext:value-type="string">
            <text:p><text:s/>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8.4429824561404" calcext:value-type="float">
            <text:p>38.4429824561404</text:p>
          </table:table-cell>
          <table:table-cell office:value-type="float" office:value="16.1842105263158" calcext:value-type="float">
            <text:p>16.1842105263158</text:p>
          </table:table-cell>
          <table:table-cell office:value-type="float" office:value="38.530701754386" calcext:value-type="float">
            <text:p>38.530701754386</text:p>
          </table:table-cell>
          <table:table-cell table:number-columns-repeated="2" office:value-type="float" office:value="3.42105263157895" calcext:value-type="float">
            <text:p>3.4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1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11.3333333333333" calcext:value-type="float">
            <text:p>11.3333333333333</text:p>
          </table:table-cell>
          <table:table-cell table:formula="of:=([.B14]+[.C14])/SUM([.B14:.E14])" office:value-type="float" office:value="0.385185185185185" calcext:value-type="float">
            <text:p>0.385185185185185</text:p>
          </table:table-cell>
          <table:table-cell table:formula="of:=([.B14]*[.C14]-[.D14]*[.E14])/SQRT(([.B14]+[.D14])*([.B14]+[.E14])*([.C14]+[.D14])*([.C14]+[.E14]))" office:value-type="float" office:value="-0.260553125167369" calcext:value-type="float">
            <text:p>-0.260553125167369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.441414141414141" calcext:value-type="float">
            <text:p>0.441414141414141</text:p>
          </table:table-cell>
          <table:table-cell office:value-type="float" office:value="0.527777777777778" calcext:value-type="float">
            <text:p>0.527777777777778</text:p>
          </table:table-cell>
          <table:table-cell office:value-type="float" office:value="0.478557504873294" calcext:value-type="float">
            <text:p>0.478557504873294</text:p>
          </table:table-cell>
          <table:table-cell office:value-type="string" calcext:value-type="string">
            <text:p><text:s/>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22.2892720306513" calcext:value-type="float">
            <text:p>22.2892720306513</text:p>
          </table:table-cell>
          <table:table-cell office:value-type="float" office:value="10.6704980842912" calcext:value-type="float">
            <text:p>10.6704980842912</text:p>
          </table:table-cell>
          <table:table-cell office:value-type="float" office:value="25.5459770114943" calcext:value-type="float">
            <text:p>25.5459770114943</text:p>
          </table:table-cell>
          <table:table-cell office:value-type="float" office:value="12.2988505747126" calcext:value-type="float">
            <text:p>12.2988505747126</text:p>
          </table:table-cell>
          <table:table-cell office:value-type="float" office:value="8.64942528735632" calcext:value-type="float">
            <text:p>8.64942528735632</text:p>
          </table:table-cell>
          <table:table-cell office:value-type="float" office:value="16.8965517241379" calcext:value-type="float">
            <text:p>16.8965517241379</text:p>
          </table:table-cell>
          <table:table-cell office:value-type="float" office:value="3.64942528735632" calcext:value-type="float">
            <text:p>3.64942528735632</text:p>
          </table:table-cell>
        </table:table-row>
        <table:table-row table:style-name="ro1">
          <table:table-cell office:value-type="string" calcext:value-type="string">
            <text:p>extended: 05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0.666666666666667" calcext:value-type="float">
            <text:p>0.666666666666667</text:p>
          </table:table-cell>
          <table:table-cell table:formula="of:=([.B15]+[.C15])/SUM([.B15:.E15])" office:value-type="float" office:value="0.637037037037037" calcext:value-type="float">
            <text:p>0.637037037037037</text:p>
          </table:table-cell>
          <table:table-cell table:formula="of:=([.B15]*[.C15]-[.D15]*[.E15])/SQRT(([.B15]+[.D15])*([.B15]+[.E15])*([.C15]+[.D15])*([.C15]+[.E15]))" office:value-type="float" office:value="0.331956864961941" calcext:value-type="float">
            <text:p>0.331956864961941</text:p>
          </table:table-cell>
          <table:table-cell office:value-type="float" office:value="8" calcext:value-type="float">
            <text:p>8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598335582546109" calcext:value-type="float">
            <text:p>0.598335582546109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740698071343233" calcext:value-type="float">
            <text:p>0.740698071343233</text:p>
          </table:table-cell>
          <table:table-cell office:value-type="string" calcext:value-type="string">
            <text:p><text:s/>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string" calcext:value-type="string">
            <text:p><text:s/>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5.55555555555556" calcext:value-type="float">
            <text:p>5.5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9.0196078431373" calcext:value-type="float">
            <text:p>49.0196078431373</text:p>
          </table:table-cell>
          <table:table-cell office:value-type="float" office:value="14.3382352941176" calcext:value-type="float">
            <text:p>14.3382352941176</text:p>
          </table:table-cell>
          <table:table-cell office:value-type="float" office:value="32.5980392156863" calcext:value-type="float">
            <text:p>32.5980392156863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1.96078431372549" calcext:value-type="float">
            <text:p>1.96078431372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1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12.6666666666667" calcext:value-type="float">
            <text:p>12.6666666666667</text:p>
          </table:table-cell>
          <table:table-cell table:formula="of:=([.B16]+[.C16])/SUM([.B16:.E16])" office:value-type="float" office:value="0.392592592592593" calcext:value-type="float">
            <text:p>0.392592592592593</text:p>
          </table:table-cell>
          <table:table-cell table:formula="of:=([.B16]*[.C16]-[.D16]*[.E16])/SQRT(([.B16]+[.D16])*([.B16]+[.E16])*([.C16]+[.D16])*([.C16]+[.E16]))" office:value-type="float" office:value="-0.228468383365844" calcext:value-type="float">
            <text:p>-0.228468383365844</text:p>
          </table:table-cell>
          <table:table-cell office:value-type="float" office:value="5" calcext:value-type="float">
            <text:p>5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<text:s/></text:p>
          </table:table-cell>
          <table:table-cell office:value-type="float" office:value="0.437229437229437" calcext:value-type="float">
            <text:p>0.437229437229437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452619843924192" calcext:value-type="float">
            <text:p>0.452619843924192</text:p>
          </table:table-cell>
          <table:table-cell office:value-type="string" calcext:value-type="string">
            <text:p><text:s/>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string" calcext:value-type="string">
            <text:p><text:s/></text:p>
          </table:table-cell>
          <table:table-cell office:value-type="float" office:value="18.1318681318681" calcext:value-type="float">
            <text:p>18.1318681318681</text:p>
          </table:table-cell>
          <table:table-cell office:value-type="float" office:value="9.70695970695971" calcext:value-type="float">
            <text:p>9.70695970695971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9.7985347985348" calcext:value-type="float">
            <text:p>9.7985347985348</text:p>
          </table:table-cell>
          <table:table-cell office:value-type="float" office:value="10.989010989011" calcext:value-type="float">
            <text:p>10.989010989011</text:p>
          </table:table-cell>
          <table:table-cell office:value-type="float" office:value="23.2600732600733" calcext:value-type="float">
            <text:p>23.2600732600733</text:p>
          </table:table-cell>
          <table:table-cell office:value-type="float" office:value="2.47252747252747" calcext:value-type="float">
            <text:p>2.47252747252747</text:p>
          </table:table-cell>
        </table:table-row>
        <table:table-row table:style-name="ro1">
          <table:table-cell office:value-type="string" calcext:value-type="string">
            <text:p>extended: 07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.33333333333333" calcext:value-type="float">
            <text:p>1.33333333333333</text:p>
          </table:table-cell>
          <table:table-cell table:formula="of:=([.B17]+[.C17])/SUM([.B17:.E17])" office:value-type="float" office:value="0.659259259259259" calcext:value-type="float">
            <text:p>0.659259259259259</text:p>
          </table:table-cell>
          <table:table-cell table:formula="of:=([.B17]*[.C17]-[.D17]*[.E17])/SQRT(([.B17]+[.D17])*([.B17]+[.E17])*([.C17]+[.D17])*([.C17]+[.E17]))" office:value-type="float" office:value="0.356753034006338" calcext:value-type="float">
            <text:p>0.356753034006338</text:p>
          </table:table-cell>
          <table:table-cell office:value-type="float" office:value="7" calcext:value-type="float">
            <text:p>7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618355718355718" calcext:value-type="float">
            <text:p>0.61835571835571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47000269034167" calcext:value-type="float">
            <text:p>0.747000269034167</text:p>
          </table:table-cell>
          <table:table-cell office:value-type="string" calcext:value-type="string">
            <text:p><text:s/>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string" calcext:value-type="string">
            <text:p><text:s/>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5.5555555555556" calcext:value-type="float">
            <text:p>45.5555555555556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4.44444444444445" calcext:value-type="float">
            <text:p>4.44444444444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7</text:p>
          </table:table-cell>
          <table:table-cell office:value-type="float" office:value="20" calcext:value-type="float">
            <text:p>20</text:p>
          </table:table-cell>
          <table:table-cell office:value-type="float" office:value="13.6666666666667" calcext:value-type="float">
            <text:p>13.6666666666667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4" calcext:value-type="float">
            <text:p>4</text:p>
          </table:table-cell>
          <table:table-cell table:formula="of:=([.B18]+[.C18])/SUM([.B18:.E18])" office:value-type="float" office:value="0.748148148148148" calcext:value-type="float">
            <text:p>0.748148148148148</text:p>
          </table:table-cell>
          <table:table-cell table:formula="of:=([.B18]*[.C18]-[.D18]*[.E18])/SQRT(([.B18]+[.D18])*([.B18]+[.E18])*([.C18]+[.D18])*([.C18]+[.E18]))" office:value-type="float" office:value="0.494596401012799" calcext:value-type="float">
            <text:p>0.494596401012799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31684981684982" calcext:value-type="float">
            <text:p>0.73168498168498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78974358974359" calcext:value-type="float">
            <text:p>0.778974358974359</text:p>
          </table:table-cell>
          <table:table-cell office:value-type="string" calcext:value-type="string">
            <text:p><text:s/>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50" calcext:value-type="float">
            <text:p>50</text:p>
          </table:table-cell>
          <table:table-cell office:value-type="float" office:value="8.33333333333333" calcext:value-type="float">
            <text:p>8.33333333333333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1.1111111111111" calcext:value-type="float">
            <text:p>41.1111111111111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6.11111111111111" calcext:value-type="float">
            <text:p>6.11111111111111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14.4444444444444" calcext:value-type="float">
            <text:p>14.4444444444444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8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33333333333333" calcext:value-type="float">
            <text:p>3.33333333333333</text:p>
          </table:table-cell>
          <table:table-cell table:formula="of:=([.B19]+[.C19])/SUM([.B19:.E19])" office:value-type="float" office:value="0.77037037037037" calcext:value-type="float">
            <text:p>0.77037037037037</text:p>
          </table:table-cell>
          <table:table-cell table:formula="of:=([.B19]*[.C19]-[.D19]*[.E19])/SQRT(([.B19]+[.D19])*([.B19]+[.E19])*([.C19]+[.D19])*([.C19]+[.E19]))" office:value-type="float" office:value="0.541061840029277" calcext:value-type="float">
            <text:p>0.541061840029277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<text:s/>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46463306808134" calcext:value-type="float">
            <text:p>0.746463306808134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79929366231253" calcext:value-type="float">
            <text:p>0.79929366231253</text:p>
          </table:table-cell>
          <table:table-cell office:value-type="string" calcext:value-type="string">
            <text:p><text:s/>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50" calcext:value-type="float">
            <text:p>50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<text:s/>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5.7407407407407" calcext:value-type="float">
            <text:p>45.7407407407407</text:p>
          </table:table-cell>
          <table:table-cell office:value-type="float" office:value="19.6296296296296" calcext:value-type="float">
            <text:p>19.629629629629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5.9259259259259" calcext:value-type="float">
            <text:p>15.9259259259259</text:p>
          </table:table-cell>
          <table:table-cell office:value-type="float" office:value="6.48148148148148" calcext:value-type="float">
            <text:p>6.48148148148148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3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.33333333333333" calcext:value-type="float">
            <text:p>4.33333333333333</text:p>
          </table:table-cell>
          <table:table-cell table:formula="of:=([.B20]+[.C20])/SUM([.B20:.E20])" office:value-type="float" office:value="0.755555555555555" calcext:value-type="float">
            <text:p>0.755555555555555</text:p>
          </table:table-cell>
          <table:table-cell table:formula="of:=([.B20]*[.C20]-[.D20]*[.E20])/SQRT(([.B20]+[.D20])*([.B20]+[.E20])*([.C20]+[.D20])*([.C20]+[.E20]))" office:value-type="float" office:value="0.508298640954079" calcext:value-type="float">
            <text:p>0.508298640954079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46206896551724" calcext:value-type="float">
            <text:p>0.746206896551724</text:p>
          </table:table-cell>
          <table:table-cell office:value-type="float" office:value="0.819444444444444" calcext:value-type="float">
            <text:p>0.819444444444444</text:p>
          </table:table-cell>
          <table:table-cell office:value-type="float" office:value="0.780130920292645" calcext:value-type="float">
            <text:p>0.780130920292645</text:p>
          </table:table-cell>
          <table:table-cell office:value-type="string" calcext:value-type="string">
            <text:p><text:s/>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3.2245532245532" calcext:value-type="float">
            <text:p>53.2245532245532</text:p>
          </table:table-cell>
          <table:table-cell office:value-type="float" office:value="6.26780626780627" calcext:value-type="float">
            <text:p>6.26780626780627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8.15850815850816" calcext:value-type="float">
            <text:p>8.15850815850816</text:p>
          </table:table-cell>
          <table:table-cell office:value-type="float" office:value="17.4566174566175" calcext:value-type="float">
            <text:p>17.4566174566175</text:p>
          </table:table-cell>
          <table:table-cell office:value-type="float" office:value="12.3284123284123" calcext:value-type="float">
            <text:p>12.328412328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9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.66666666666667" calcext:value-type="float">
            <text:p>4.66666666666667</text:p>
          </table:table-cell>
          <table:table-cell table:formula="of:=([.B21]+[.C21])/SUM([.B21:.E21])" office:value-type="float" office:value="0.748148148148148" calcext:value-type="float">
            <text:p>0.748148148148148</text:p>
          </table:table-cell>
          <table:table-cell table:formula="of:=([.B21]*[.C21]-[.D21]*[.E21])/SQRT(([.B21]+[.D21])*([.B21]+[.E21])*([.C21]+[.D21])*([.C21]+[.E21]))" office:value-type="float" office:value="0.493010721999979" calcext:value-type="float">
            <text:p>0.493010721999979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44712643678161" calcext:value-type="float">
            <text:p>0.744712643678161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0.772654344756771" calcext:value-type="float">
            <text:p>0.772654344756771</text:p>
          </table:table-cell>
          <table:table-cell office:value-type="string" calcext:value-type="string">
            <text:p><text:s/>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0.2525252525253" calcext:value-type="float">
            <text:p>50.2525252525253</text:p>
          </table:table-cell>
          <table:table-cell office:value-type="float" office:value="8.83838383838384" calcext:value-type="float">
            <text:p>8.83838383838384</text:p>
          </table:table-cell>
          <table:table-cell office:value-type="float" office:value="0" calcext:value-type="float">
            <text:p>0</text:p>
          </table:table-cell>
          <table:table-cell office:value-type="float" office:value="17.6767676767677" calcext:value-type="float">
            <text:p>17.6767676767677</text:p>
          </table:table-cell>
          <table:table-cell office:value-type="float" office:value="14.3939393939394" calcext:value-type="float">
            <text:p>14.3939393939394</text:p>
          </table:table-cell>
          <table:table-cell office:value-type="float" office:value="8.83838383838384" calcext:value-type="float">
            <text:p>8.8383838383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20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66666666666667" calcext:value-type="float">
            <text:p>5.66666666666667</text:p>
          </table:table-cell>
          <table:table-cell table:formula="of:=([.B22]+[.C22])/SUM([.B22:.E22])" office:value-type="float" office:value="0.740740740740741" calcext:value-type="float">
            <text:p>0.740740740740741</text:p>
          </table:table-cell>
          <table:table-cell table:formula="of:=([.B22]*[.C22]-[.D22]*[.E22])/SQRT(([.B22]+[.D22])*([.B22]+[.E22])*([.C22]+[.D22])*([.C22]+[.E22]))" office:value-type="float" office:value="0.478702564694783" calcext:value-type="float">
            <text:p>0.478702564694783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53888888888889" calcext:value-type="float">
            <text:p>0.753888888888889</text:p>
          </table:table-cell>
          <table:table-cell office:value-type="float" office:value="0.763888888888889" calcext:value-type="float">
            <text:p>0.763888888888889</text:p>
          </table:table-cell>
          <table:table-cell office:value-type="float" office:value="0.758786848072563" calcext:value-type="float">
            <text:p>0.758786848072563</text:p>
          </table:table-cell>
          <table:table-cell office:value-type="string" calcext:value-type="string">
            <text:p><text:s/>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7.4786324786325" calcext:value-type="float">
            <text:p>37.4786324786325</text:p>
          </table:table-cell>
          <table:table-cell office:value-type="float" office:value="13.8034188034188" calcext:value-type="float">
            <text:p>13.8034188034188</text:p>
          </table:table-cell>
          <table:table-cell office:value-type="float" office:value="0" calcext:value-type="float">
            <text:p>0</text:p>
          </table:table-cell>
          <table:table-cell office:value-type="float" office:value="16.7948717948718" calcext:value-type="float">
            <text:p>16.7948717948718</text:p>
          </table:table-cell>
          <table:table-cell office:value-type="float" office:value="20.1282051282051" calcext:value-type="float">
            <text:p>20.1282051282051</text:p>
          </table:table-cell>
          <table:table-cell office:value-type="float" office:value="11.7948717948718" calcext:value-type="float">
            <text:p>11.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5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66666666666667" calcext:value-type="float">
            <text:p>6.66666666666667</text:p>
          </table:table-cell>
          <table:table-cell table:formula="of:=([.B23]+[.C23])/SUM([.B23:.E23])" office:value-type="float" office:value="0.718518518518519" calcext:value-type="float">
            <text:p>0.718518518518519</text:p>
          </table:table-cell>
          <table:table-cell table:formula="of:=([.B23]*[.C23]-[.D23]*[.E23])/SQRT(([.B23]+[.D23])*([.B23]+[.E23])*([.C23]+[.D23])*([.C23]+[.E23]))" office:value-type="float" office:value="0.43583586846268" calcext:value-type="float">
            <text:p>0.43583586846268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48917748917749" calcext:value-type="float">
            <text:p>0.748917748917749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733200719901487" calcext:value-type="float">
            <text:p>0.733200719901487</text:p>
          </table:table-cell>
          <table:table-cell office:value-type="string" calcext:value-type="string">
            <text:p><text:s/>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5.8119658119658" calcext:value-type="float">
            <text:p>35.8119658119658</text:p>
          </table:table-cell>
          <table:table-cell office:value-type="float" office:value="10.3418803418803" calcext:value-type="float">
            <text:p>10.3418803418803</text:p>
          </table:table-cell>
          <table:table-cell office:value-type="float" office:value="0" calcext:value-type="float">
            <text:p>0</text:p>
          </table:table-cell>
          <table:table-cell office:value-type="float" office:value="18.8034188034188" calcext:value-type="float">
            <text:p>18.8034188034188</text:p>
          </table:table-cell>
          <table:table-cell office:value-type="float" office:value="16.2393162393162" calcext:value-type="float">
            <text:p>16.2393162393162</text:p>
          </table:table-cell>
          <table:table-cell office:value-type="float" office:value="18.8034188034188" calcext:value-type="float">
            <text:p>18.8034188034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6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3.33333333333333" calcext:value-type="float">
            <text:p>3.33333333333333</text:p>
          </table:table-cell>
          <table:table-cell table:formula="of:=([.B24]+[.C24])/SUM([.B24:.E24])" office:value-type="float" office:value="0.8" calcext:value-type="float">
            <text:p>0.8</text:p>
          </table:table-cell>
          <table:table-cell table:formula="of:=([.B24]*[.C24]-[.D24]*[.E24])/SQRT(([.B24]+[.D24])*([.B24]+[.E24])*([.C24]+[.D24])*([.C24]+[.E24]))" office:value-type="float" office:value="0.598707490135634" calcext:value-type="float">
            <text:p>0.598707490135634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89444444444444" calcext:value-type="float">
            <text:p>0.789444444444444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21775006298816" calcext:value-type="float">
            <text:p>0.821775006298816</text:p>
          </table:table-cell>
          <table:table-cell office:value-type="string" calcext:value-type="string">
            <text:p><text:s/>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13.030303030303" calcext:value-type="float">
            <text:p>13.030303030303</text:p>
          </table:table-cell>
          <table:table-cell office:value-type="float" office:value="0" calcext:value-type="float">
            <text:p>0</text:p>
          </table:table-cell>
          <table:table-cell office:value-type="float" office:value="9.39393939393939" calcext:value-type="float">
            <text:p>9.39393939393939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20.5050505050505" calcext:value-type="float">
            <text:p>20.505050505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B25]+[.C25])/SUM([.B25:.E25])" office:value-type="float" office:value="0.733333333333333" calcext:value-type="float">
            <text:p>0.733333333333333</text:p>
          </table:table-cell>
          <table:table-cell table:formula="of:=([.B25]*[.C25]-[.D25]*[.E25])/SQRT(([.B25]+[.D25])*([.B25]+[.E25])*([.C25]+[.D25])*([.C25]+[.E25]))" office:value-type="float" office:value="0.469307850815236" calcext:value-type="float">
            <text:p>0.46930785081523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77301587301587" calcext:value-type="float">
            <text:p>0.777301587301587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739510753796468" calcext:value-type="float">
            <text:p>0.739510753796468</text:p>
          </table:table-cell>
          <table:table-cell office:value-type="string" calcext:value-type="string">
            <text:p><text:s/>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25" calcext:value-type="float">
            <text:p>25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0.5128205128205" calcext:value-type="float">
            <text:p>30.512820512820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16.9230769230769" calcext:value-type="float">
            <text:p>16.9230769230769</text:p>
          </table:table-cell>
          <table:table-cell office:value-type="float" office:value="13.5897435897436" calcext:value-type="float">
            <text:p>13.5897435897436</text:p>
          </table:table-cell>
          <table:table-cell office:value-type="float" office:value="28.7179487179487" calcext:value-type="float">
            <text:p>28.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2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8.33333333333333" calcext:value-type="float">
            <text:p>8.33333333333333</text:p>
          </table:table-cell>
          <table:table-cell table:formula="of:=([.B26]+[.C26])/SUM([.B26:.E26])" office:value-type="float" office:value="0.733333333333333" calcext:value-type="float">
            <text:p>0.733333333333333</text:p>
          </table:table-cell>
          <table:table-cell table:formula="of:=([.B26]*[.C26]-[.D26]*[.E26])/SQRT(([.B26]+[.D26])*([.B26]+[.E26])*([.C26]+[.D26])*([.C26]+[.E26]))" office:value-type="float" office:value="0.481907482644146" calcext:value-type="float">
            <text:p>0.48190748264414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12067822298001" calcext:value-type="float">
            <text:p>0.812067822298001</text:p>
          </table:table-cell>
          <table:table-cell office:value-type="float" office:value="0.652777777777778" calcext:value-type="float">
            <text:p>0.652777777777778</text:p>
          </table:table-cell>
          <table:table-cell office:value-type="float" office:value="0.720669516725563" calcext:value-type="float">
            <text:p>0.720669516725563</text:p>
          </table:table-cell>
          <table:table-cell office:value-type="string" calcext:value-type="string">
            <text:p><text:s/>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7.6767676767677" calcext:value-type="float">
            <text:p>27.6767676767677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0" calcext:value-type="float">
            <text:p>0</text:p>
          </table:table-cell>
          <table:table-cell office:value-type="float" office:value="16.3636363636364" calcext:value-type="float">
            <text:p>16.3636363636364</text:p>
          </table:table-cell>
          <table:table-cell office:value-type="float" office:value="25.7575757575758" calcext:value-type="float">
            <text:p>25.7575757575758</text:p>
          </table:table-cell>
          <table:table-cell office:value-type="float" office:value="27.1717171717172" calcext:value-type="float">
            <text:p>27.1717171717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10</text:p>
          </table:table-cell>
          <table:table-cell office:value-type="float" office:value="13.6666666666667" calcext:value-type="float">
            <text:p>13.666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3333333333333" calcext:value-type="float">
            <text:p>10.3333333333333</text:p>
          </table:table-cell>
          <table:table-cell table:formula="of:=([.B27]+[.C27])/SUM([.B27:.E27])" office:value-type="float" office:value="0.703703703703704" calcext:value-type="float">
            <text:p>0.703703703703704</text:p>
          </table:table-cell>
          <table:table-cell table:formula="of:=([.B27]*[.C27]-[.D27]*[.E27])/SQRT(([.B27]+[.D27])*([.B27]+[.E27])*([.C27]+[.D27])*([.C27]+[.E27]))" office:value-type="float" office:value="0.440707033158798" calcext:value-type="float">
            <text:p>0.440707033158798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<text:s/>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26361655773421" calcext:value-type="float">
            <text:p>0.826361655773421</text:p>
          </table:table-cell>
          <table:table-cell office:value-type="float" office:value="0.569444444444445" calcext:value-type="float">
            <text:p>0.569444444444445</text:p>
          </table:table-cell>
          <table:table-cell office:value-type="float" office:value="0.67330772208821" calcext:value-type="float">
            <text:p>0.67330772208821</text:p>
          </table:table-cell>
          <table:table-cell office:value-type="string" calcext:value-type="string">
            <text:p><text:s/>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<text:s/>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8.5751748251748" calcext:value-type="float">
            <text:p>18.5751748251748</text:p>
          </table:table-cell>
          <table:table-cell office:value-type="float" office:value="0" calcext:value-type="float">
            <text:p>0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25.5973193473193" calcext:value-type="float">
            <text:p>25.5973193473193</text:p>
          </table:table-cell>
          <table:table-cell office:value-type="float" office:value="22.0862470862471" calcext:value-type="float">
            <text:p>22.0862470862471</text:p>
          </table:table-cell>
          <table:table-cell office:value-type="float" office:value="31.1771561771562" calcext:value-type="float">
            <text:p>31.177156177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9</text:p>
          </table:table-cell>
          <table:table-cell office:value-type="float" office:value="16" calcext:value-type="float">
            <text:p>16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8" calcext:value-type="float">
            <text:p>8</text:p>
          </table:table-cell>
          <table:table-cell table:formula="of:=([.B28]+[.C28])/SUM([.B28:.E28])" office:value-type="float" office:value="0.785185185185185" calcext:value-type="float">
            <text:p>0.785185185185185</text:p>
          </table:table-cell>
          <table:table-cell table:formula="of:=([.B28]*[.C28]-[.D28]*[.E28])/SQRT(([.B28]+[.D28])*([.B28]+[.E28])*([.C28]+[.D28])*([.C28]+[.E28]))" office:value-type="float" office:value="0.600002191392575" calcext:value-type="float">
            <text:p>0.600002191392575</text:p>
          </table:table-cell>
          <table:table-cell office:value-type="float" office:value="1.66666666666667" calcext:value-type="float">
            <text:p>1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03703703703704" calcext:value-type="float">
            <text:p>0.90370370370370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64790764790765" calcext:value-type="float">
            <text:p>0.764790764790765</text:p>
          </table:table-cell>
          <table:table-cell office:value-type="string" calcext:value-type="string">
            <text:p><text:s/></text:p>
          </table:table-cell>
          <table:table-cell office:value-type="float" office:value="18.5185185185185" calcext:value-type="float">
            <text:p>18.5185185185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5" calcext:value-type="float">
            <text:p>44.4444444444445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7.6282051282051" calcext:value-type="float">
            <text:p>17.628205128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25641025641" calcext:value-type="float">
            <text:p>16.025641025641</text:p>
          </table:table-cell>
          <table:table-cell office:value-type="float" office:value="28.525641025641" calcext:value-type="float">
            <text:p>28.525641025641</text:p>
          </table:table-cell>
          <table:table-cell office:value-type="float" office:value="37.8205128205128" calcext:value-type="float">
            <text:p>37.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9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8.66666666666667" calcext:value-type="float">
            <text:p>8.66666666666667</text:p>
          </table:table-cell>
          <table:table-cell table:formula="of:=([.B29]+[.C29])/SUM([.B29:.E29])" office:value-type="float" office:value="0.77037037037037" calcext:value-type="float">
            <text:p>0.77037037037037</text:p>
          </table:table-cell>
          <table:table-cell table:formula="of:=([.B29]*[.C29]-[.D29]*[.E29])/SQRT(([.B29]+[.D29])*([.B29]+[.E29])*([.C29]+[.D29])*([.C29]+[.E29]))" office:value-type="float" office:value="0.57574525012128" calcext:value-type="float">
            <text:p>0.5757452501212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743604287563448" calcext:value-type="float">
            <text:p>0.743604287563448</text:p>
          </table:table-cell>
          <table:table-cell office:value-type="string" calcext:value-type="string">
            <text:p><text:s/>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.5050505050505" calcext:value-type="float">
            <text:p>10.5050505050505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43.8383838383838" calcext:value-type="float">
            <text:p>43.8383838383838</text:p>
          </table:table-cell>
          <table:table-cell office:value-type="float" office:value="30.7070707070707" calcext:value-type="float">
            <text:p>30.707070707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8</text:p>
          </table:table-cell>
          <table:table-cell office:value-type="float" office:value="15" calcext:value-type="float">
            <text:p>15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9" calcext:value-type="float">
            <text:p>9</text:p>
          </table:table-cell>
          <table:table-cell table:formula="of:=([.B30]+[.C30])/SUM([.B30:.E30])" office:value-type="float" office:value="0.762962962962963" calcext:value-type="float">
            <text:p>0.762962962962963</text:p>
          </table:table-cell>
          <table:table-cell table:formula="of:=([.B30]*[.C30]-[.D30]*[.E30])/SQRT(([.B30]+[.D30])*([.B30]+[.E30])*([.C30]+[.D30])*([.C30]+[.E30]))" office:value-type="float" office:value="0.563695042412417" calcext:value-type="float">
            <text:p>0.563695042412417</text:p>
          </table:table-cell>
          <table:table-cell office:value-type="float" office:value="1.66666666666667" calcext:value-type="float">
            <text:p>1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05555555555556" calcext:value-type="float">
            <text:p>0.90555555555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6208236208236" calcext:value-type="float">
            <text:p>0.736208236208236</text:p>
          </table:table-cell>
          <table:table-cell office:value-type="string" calcext:value-type="string">
            <text:p><text:s/></text:p>
          </table:table-cell>
          <table:table-cell office:value-type="float" office:value="18.5185185185185" calcext:value-type="float">
            <text:p>18.5185185185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6.0606060606061" calcext:value-type="float">
            <text:p>16.0606060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484848484849" calcext:value-type="float">
            <text:p>24.8484848484849</text:p>
          </table:table-cell>
          <table:table-cell office:value-type="float" office:value="31.2121212121212" calcext:value-type="float">
            <text:p>31.2121212121212</text:p>
          </table:table-cell>
          <table:table-cell office:value-type="float" office:value="27.8787878787879" calcext:value-type="float">
            <text:p>27.878787878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20</text:p>
          </table:table-cell>
          <table:table-cell office:value-type="float" office:value="13" calcext:value-type="float">
            <text:p>13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1" calcext:value-type="float">
            <text:p>11</text:p>
          </table:table-cell>
          <table:table-cell table:formula="of:=([.B31]+[.C31])/SUM([.B31:.E31])" office:value-type="float" office:value="0.718518518518518" calcext:value-type="float">
            <text:p>0.718518518518518</text:p>
          </table:table-cell>
          <table:table-cell table:formula="of:=([.B31]*[.C31]-[.D31]*[.E31])/SQRT(([.B31]+[.D31])*([.B31]+[.E31])*([.C31]+[.D31])*([.C31]+[.E31]))" office:value-type="float" office:value="0.492056386662344" calcext:value-type="float">
            <text:p>0.49205638666234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84126984126984" calcext:value-type="float">
            <text:p>0.884126984126984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67161493477283" calcext:value-type="float">
            <text:p>0.67161493477283</text:p>
          </table:table-cell>
          <table:table-cell office:value-type="string" calcext:value-type="string">
            <text:p><text:s/>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.2948717948718" calcext:value-type="float">
            <text:p>9.2948717948718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5.5163817663818" calcext:value-type="float">
            <text:p>25.5163817663818</text:p>
          </table:table-cell>
          <table:table-cell office:value-type="float" office:value="33.4045584045584" calcext:value-type="float">
            <text:p>33.4045584045584</text:p>
          </table:table-cell>
          <table:table-cell office:value-type="float" office:value="29.7008547008547" calcext:value-type="float">
            <text:p>29.7008547008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5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9.66666666666667" calcext:value-type="float">
            <text:p>9.66666666666667</text:p>
          </table:table-cell>
          <table:table-cell table:formula="of:=([.B32]+[.C32])/SUM([.B32:.E32])" office:value-type="float" office:value="0.755555555555556" calcext:value-type="float">
            <text:p>0.755555555555556</text:p>
          </table:table-cell>
          <table:table-cell table:formula="of:=([.B32]*[.C32]-[.D32]*[.E32])/SQRT(([.B32]+[.D32])*([.B32]+[.E32])*([.C32]+[.D32])*([.C32]+[.E32]))" office:value-type="float" office:value="0.558943617613286" calcext:value-type="float">
            <text:p>0.55894361761328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16339869281046" calcext:value-type="float">
            <text:p>0.916339869281046</text:p>
          </table:table-cell>
          <table:table-cell office:value-type="float" office:value="0.597222222222222" calcext:value-type="float">
            <text:p>0.597222222222222</text:p>
          </table:table-cell>
          <table:table-cell office:value-type="float" office:value="0.722534917656869" calcext:value-type="float">
            <text:p>0.722534917656869</text:p>
          </table:table-cell>
          <table:table-cell office:value-type="string" calcext:value-type="string">
            <text:p><text:s/>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.3030303030303" calcext:value-type="float">
            <text:p>30.3030303030303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3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66666666666667" calcext:value-type="float">
            <text:p>5.66666666666667</text:p>
          </table:table-cell>
          <table:table-cell table:formula="of:=([.B33]+[.C33])/SUM([.B33:.E33])" office:value-type="float" office:value="0.851851851851852" calcext:value-type="float">
            <text:p>0.851851851851852</text:p>
          </table:table-cell>
          <table:table-cell table:formula="of:=([.B33]*[.C33]-[.D33]*[.E33])/SQRT(([.B33]+[.D33])*([.B33]+[.E33])*([.C33]+[.D33])*([.C33]+[.E33]))" office:value-type="float" office:value="0.721861415910941" calcext:value-type="float">
            <text:p>0.7218614159109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0.763888888888889" calcext:value-type="float">
            <text:p>0.763888888888889</text:p>
          </table:table-cell>
          <table:table-cell office:value-type="float" office:value="0.846358726479075" calcext:value-type="float">
            <text:p>0.846358726479075</text:p>
          </table:table-cell>
          <table:table-cell office:value-type="string" calcext:value-type="string">
            <text:p><text:s/>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857142857143" calcext:value-type="float">
            <text:p>31.7857142857143</text:p>
          </table:table-cell>
          <table:table-cell office:value-type="float" office:value="38.452380952381" calcext:value-type="float">
            <text:p>38.452380952381</text:p>
          </table:table-cell>
          <table:table-cell office:value-type="float" office:value="17.2619047619048" calcext:value-type="float">
            <text:p>17.2619047619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7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66666666666667" calcext:value-type="float">
            <text:p>9.66666666666667</text:p>
          </table:table-cell>
          <table:table-cell table:formula="of:=([.B34]+[.C34])/SUM([.B34:.E34])" office:value-type="float" office:value="0.762962962962963" calcext:value-type="float">
            <text:p>0.762962962962963</text:p>
          </table:table-cell>
          <table:table-cell table:formula="of:=([.B34]*[.C34]-[.D34]*[.E34])/SQRT(([.B34]+[.D34])*([.B34]+[.E34])*([.C34]+[.D34])*([.C34]+[.E34]))" office:value-type="float" office:value="0.578511286678396" calcext:value-type="float">
            <text:p>0.57851128667839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33917797888386" calcext:value-type="float">
            <text:p>0.933917797888386</text:p>
          </table:table-cell>
          <table:table-cell office:value-type="float" office:value="0.597222222222222" calcext:value-type="float">
            <text:p>0.597222222222222</text:p>
          </table:table-cell>
          <table:table-cell office:value-type="float" office:value="0.726378817842233" calcext:value-type="float">
            <text:p>0.726378817842233</text:p>
          </table:table-cell>
          <table:table-cell office:value-type="string" calcext:value-type="string">
            <text:p><text:s/></text:p>
          </table:table-cell>
          <table:table-cell office:value-type="float" office:value="7.40740740740741" calcext:value-type="float">
            <text:p>7.40740740740741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.03703703703704" calcext:value-type="float">
            <text:p>7.03703703703704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0" calcext:value-type="float">
            <text:p>0</text:p>
          </table:table-cell>
          <table:table-cell office:value-type="float" office:value="28.034188034188" calcext:value-type="float">
            <text:p>28.034188034188</text:p>
          </table:table-cell>
          <table:table-cell office:value-type="float" office:value="37.6353276353276" calcext:value-type="float">
            <text:p>37.6353276353276</text:p>
          </table:table-cell>
          <table:table-cell office:value-type="float" office:value="24.7293447293447" calcext:value-type="float">
            <text:p>24.7293447293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: 08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.6666666666667" calcext:value-type="float">
            <text:p>12.6666666666667</text:p>
          </table:table-cell>
          <table:table-cell table:formula="of:=([.B35]+[.C35])/SUM([.B35:.E35])" office:value-type="float" office:value="0.696296296296296" calcext:value-type="float">
            <text:p>0.696296296296296</text:p>
          </table:table-cell>
          <table:table-cell table:formula="of:=([.B35]*[.C35]-[.D35]*[.E35])/SQRT(([.B35]+[.D35])*([.B35]+[.E35])*([.C35]+[.D35])*([.C35]+[.E35]))" office:value-type="float" office:value="0.474904035443774" calcext:value-type="float">
            <text:p>0.474904035443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18518518518519" calcext:value-type="float">
            <text:p>0.918518518518519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618072618072618" calcext:value-type="float">
            <text:p>0.618072618072618</text:p>
          </table:table-cell>
          <table:table-cell office:value-type="string" calcext:value-type="string">
            <text:p><text:s/>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.08898944193062" calcext:value-type="float">
            <text:p>7.0889894419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84519402166" calcext:value-type="float">
            <text:p>22.5284519402166</text:p>
          </table:table-cell>
          <table:table-cell office:value-type="float" office:value="27.6566570684218" calcext:value-type="float">
            <text:p>27.6566570684218</text:p>
          </table:table-cell>
          <table:table-cell office:value-type="float" office:value="42.725901549431" calcext:value-type="float">
            <text:p>42.725901549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6</text:p>
          </table:table-cell>
          <table:table-cell office:value-type="float" office:value="15" calcext:value-type="float">
            <text:p>15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9" calcext:value-type="float">
            <text:p>9</text:p>
          </table:table-cell>
          <table:table-cell table:formula="of:=([.B36]+[.C36])/SUM([.B36:.E36])" office:value-type="float" office:value="0.785185185185185" calcext:value-type="float">
            <text:p>0.785185185185185</text:p>
          </table:table-cell>
          <table:table-cell table:formula="of:=([.B36]*[.C36]-[.D36]*[.E36])/SQRT(([.B36]+[.D36])*([.B36]+[.E36])*([.C36]+[.D36])*([.C36]+[.E36]))" office:value-type="float" office:value="0.621279337049712" calcext:value-type="float">
            <text:p>0.621279337049712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56582633053221" calcext:value-type="float">
            <text:p>0.95658263305322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4899443731279" calcext:value-type="float">
            <text:p>0.754899443731279</text:p>
          </table:table-cell>
          <table:table-cell office:value-type="string" calcext:value-type="string">
            <text:p><text:s/></text:p>
          </table:table-cell>
          <table:table-cell office:value-type="float" office:value="7.40740740740741" calcext:value-type="float">
            <text:p>7.4074074074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.48148148148148" calcext:value-type="float">
            <text:p>6.4814814814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31.0185185185185" calcext:value-type="float">
            <text:p>31.0185185185185</text:p>
          </table:table-cell>
          <table:table-cell office:value-type="float" office:value="31.9444444444444" calcext:value-type="float">
            <text:p>31.9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1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1.3333333333333" calcext:value-type="float">
            <text:p>11.3333333333333</text:p>
          </table:table-cell>
          <table:table-cell table:formula="of:=([.B37]+[.C37])/SUM([.B37:.E37])" office:value-type="float" office:value="0.733333333333333" calcext:value-type="float">
            <text:p>0.733333333333333</text:p>
          </table:table-cell>
          <table:table-cell table:formula="of:=([.B37]*[.C37]-[.D37]*[.E37])/SQRT(([.B37]+[.D37])*([.B37]+[.E37])*([.C37]+[.D37])*([.C37]+[.E37]))" office:value-type="float" office:value="0.541943730952575" calcext:value-type="float">
            <text:p>0.541943730952575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5" calcext:value-type="float">
            <text:p>0.95</text:p>
          </table:table-cell>
          <table:table-cell office:value-type="float" office:value="0.527777777777778" calcext:value-type="float">
            <text:p>0.527777777777778</text:p>
          </table:table-cell>
          <table:table-cell office:value-type="float" office:value="0.677254177254177" calcext:value-type="float">
            <text:p>0.677254177254177</text:p>
          </table:table-cell>
          <table:table-cell office:value-type="string" calcext:value-type="string">
            <text:p><text:s/></text:p>
          </table:table-cell>
          <table:table-cell office:value-type="float" office:value="7.40740740740741" calcext:value-type="float">
            <text:p>7.4074074074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.41125541125541" calcext:value-type="float">
            <text:p>5.41125541125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056277056277" calcext:value-type="float">
            <text:p>27.7056277056277</text:p>
          </table:table-cell>
          <table:table-cell office:value-type="float" office:value="42.2077922077922" calcext:value-type="float">
            <text:p>42.2077922077922</text:p>
          </table:table-cell>
          <table:table-cell office:value-type="float" office:value="24.6753246753247" calcext:value-type="float">
            <text:p>24.675324675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0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.3333333333333" calcext:value-type="float">
            <text:p>12.3333333333333</text:p>
          </table:table-cell>
          <table:table-cell table:formula="of:=([.B38]+[.C38])/SUM([.B38:.E38])" office:value-type="float" office:value="0.711111111111111" calcext:value-type="float">
            <text:p>0.711111111111111</text:p>
          </table:table-cell>
          <table:table-cell table:formula="of:=([.B38]*[.C38]-[.D38]*[.E38])/SQRT(([.B38]+[.D38])*([.B38]+[.E38])*([.C38]+[.D38])*([.C38]+[.E38]))" office:value-type="float" office:value="0.508191701479553" calcext:value-type="float">
            <text:p>0.50819170147955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486111111111111" calcext:value-type="float">
            <text:p>0.486111111111111</text:p>
          </table:table-cell>
          <table:table-cell office:value-type="float" office:value="0.638774997908125" calcext:value-type="float">
            <text:p>0.638774997908125</text:p>
          </table:table-cell>
          <table:table-cell office:value-type="string" calcext:value-type="string">
            <text:p><text:s/></text:p>
          </table:table-cell>
          <table:table-cell office:value-type="float" office:value="7.40740740740741" calcext:value-type="float">
            <text:p>7.4074074074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.86111111111111" calcext:value-type="float">
            <text:p>4.86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06060606061" calcext:value-type="float">
            <text:p>24.8106060606061</text:p>
          </table:table-cell>
          <table:table-cell office:value-type="float" office:value="36.6792929292929" calcext:value-type="float">
            <text:p>36.6792929292929</text:p>
          </table:table-cell>
          <table:table-cell office:value-type="float" office:value="33.6489898989899" calcext:value-type="float">
            <text:p>33.6489898989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12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3.3333333333333" calcext:value-type="float">
            <text:p>13.3333333333333</text:p>
          </table:table-cell>
          <table:table-cell table:formula="of:=([.B39]+[.C39])/SUM([.B39:.E39])" office:value-type="float" office:value="0.688888888888889" calcext:value-type="float">
            <text:p>0.688888888888889</text:p>
          </table:table-cell>
          <table:table-cell table:formula="of:=([.B39]*[.C39]-[.D39]*[.E39])/SQRT(([.B39]+[.D39])*([.B39]+[.E39])*([.C39]+[.D39])*([.C39]+[.E39]))" office:value-type="float" office:value="0.474317530311389" calcext:value-type="float">
            <text:p>0.474317530311389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46581196581197" calcext:value-type="float">
            <text:p>0.946581196581197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601738101738102" calcext:value-type="float">
            <text:p>0.601738101738102</text:p>
          </table:table-cell>
          <table:table-cell office:value-type="string" calcext:value-type="string">
            <text:p><text:s/></text:p>
          </table:table-cell>
          <table:table-cell office:value-type="float" office:value="7.40740740740741" calcext:value-type="float">
            <text:p>7.4074074074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.94505494505495" calcext:value-type="float">
            <text:p>4.9450549450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409035409035" calcext:value-type="float">
            <text:p>23.5409035409035</text:p>
          </table:table-cell>
          <table:table-cell office:value-type="float" office:value="38.0586080586081" calcext:value-type="float">
            <text:p>38.0586080586081</text:p>
          </table:table-cell>
          <table:table-cell office:value-type="float" office:value="33.4554334554335" calcext:value-type="float">
            <text:p>33.4554334554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9</text:p>
          </table:table-cell>
          <table:table-cell office:value-type="float" office:value="10" calcext:value-type="float">
            <text:p>10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4" calcext:value-type="float">
            <text:p>14</text:p>
          </table:table-cell>
          <table:table-cell table:formula="of:=([.B40]+[.C40])/SUM([.B40:.E40])" office:value-type="float" office:value="0.681481481481482" calcext:value-type="float">
            <text:p>0.681481481481482</text:p>
          </table:table-cell>
          <table:table-cell table:formula="of:=([.B40]*[.C40]-[.D40]*[.E40])/SQRT(([.B40]+[.D40])*([.B40]+[.E40])*([.C40]+[.D40])*([.C40]+[.E40]))" office:value-type="float" office:value="0.47540072464156" calcext:value-type="float">
            <text:p>0.47540072464156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81600316894435" calcext:value-type="float">
            <text:p>0.581600316894435</text:p>
          </table:table-cell>
          <table:table-cell office:value-type="string" calcext:value-type="string">
            <text:p><text:s/></text:p>
          </table:table-cell>
          <table:table-cell office:value-type="float" office:value="3.7037037037037" calcext:value-type="float">
            <text:p>3.703703703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38095238095238" calcext:value-type="float">
            <text:p>2.3809523809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555555555556" calcext:value-type="float">
            <text:p>25.5555555555556</text:p>
          </table:table-cell>
          <table:table-cell office:value-type="float" office:value="34.7619047619048" calcext:value-type="float">
            <text:p>34.7619047619048</text:p>
          </table:table-cell>
          <table:table-cell office:value-type="float" office:value="37.3015873015873" calcext:value-type="float">
            <text:p>37.3015873015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ed: 0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.6666666666667" calcext:value-type="float">
            <text:p>15.6666666666667</text:p>
          </table:table-cell>
          <table:table-cell table:formula="of:=([.B41]+[.C41])/SUM([.B41:.E41])" office:value-type="float" office:value="0.651851851851852" calcext:value-type="float">
            <text:p>0.651851851851852</text:p>
          </table:table-cell>
          <table:table-cell table:formula="of:=([.B41]*[.C41]-[.D41]*[.E41])/SQRT(([.B41]+[.D41])*([.B41]+[.E41])*([.C41]+[.D41])*([.C41]+[.E41]))" office:value-type="float" office:value="0.445941292507922" calcext:value-type="float">
            <text:p>0.445941292507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4.66666666666667" calcext:value-type="float">
            <text:p>4.66666666666667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347222222222222" calcext:value-type="float">
            <text:p>0.347222222222222</text:p>
          </table:table-cell>
          <table:table-cell office:value-type="float" office:value="0.514173998044966" calcext:value-type="float">
            <text:p>0.514173998044966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.8039215686274" calcext:value-type="float">
            <text:p>29.8039215686274</text:p>
          </table:table-cell>
          <table:table-cell office:value-type="float" office:value="40.3921568627451" calcext:value-type="float">
            <text:p>40.392156862745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mpare.A1:compare.AJ4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7T14:03:08.135306838</dc:date>
    <meta:editing-duration>PT2M39S</meta:editing-duration>
    <meta:editing-cycles>1</meta:editing-cycles>
    <meta:document-statistic meta:table-count="1" meta:cell-count="1476" meta:object-count="0"/>
    <meta:generator>LibreOffice/24.8.6.2$Linux_X86_64 LibreOffice_project/480$Build-2</meta:generator>
  </office:meta>
</office:document-meta>
</file>